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4" style:family="paragraph"/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5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6" style:family="paragraph"/>
    <style:style style:name="P40" style:parent-style-name="Normal" style:list-style-name="LFO6" style:family="paragraph"/>
    <style:style style:name="P41" style:parent-style-name="Normal" style:list-style-name="LFO6" style:family="paragraph"/>
    <style:style style:name="P42" style:parent-style-name="Normal" style:list-style-name="LFO6" style:family="paragraph"/>
    <style:style style:name="T4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tudy Materials: Tools &amp; Debugging</text:p>
      <text:p text:style-name="P2"/>
      <text:p text:style-name="P3">1) Standardize formatting and editor behavior</text:p>
      <text:p text:style-name="Normal">These settings help everyone’s editor behave the same way, so the codebase stays consistent even if people use different machines or personal preferences.</text:p>
      <text:list text:style-name="LFO1" text:continue-numbering="true">
        <text:list-item>
          <text:p text:style-name="P4"><text:span text:style-name="T5">tabSize</text:span>: controls how many spaces a tab represents visually and when indenting.</text:p>
          <text:list text:continue-numbering="true">
            <text:list-item>
              <text:p text:style-name="P6">Example: tabSize: 2 is common in JavaScript/TypeScript projects.</text:p>
            </text:list-item>
          </text:list>
        </text:list-item>
        <text:list-item>
          <text:p text:style-name="P7"><text:span text:style-name="T8">files.eol</text:span>: sets the end-of-line character used when saving files.</text:p>
          <text:list text:continue-numbering="true">
            <text:list-item>
              <text:p text:style-name="P9">\n = Unix/macOS/Linux style</text:p>
            </text:list-item>
            <text:list-item>
              <text:p text:style-name="P10">\r\n = Windows style</text:p>
            </text:list-item>
            <text:list-item>
              <text:p text:style-name="P11">Standardizing this avoids noisy Git diffs caused only by line endings.</text:p>
            </text:list-item>
          </text:list>
        </text:list-item>
        <text:list-item>
          <text:p text:style-name="P12"><text:span text:style-name="T13">files.exclude</text:span>: hides files/folders from the Explorer view.</text:p>
          <text:list text:continue-numbering="true">
            <text:list-item>
              <text:p text:style-name="P14">Useful for reducing clutter, especially for generated files like dist, node_modules, or build artifacts.</text:p>
            </text:list-item>
          </text:list>
        </text:list-item>
      </text:list>
      <text:p text:style-name="P15">2) Use the project’s TypeScript version</text:p>
      <text:p text:style-name="Normal">Pointing <text:span text:style-name="T16">typescript.tsdk</text:span> to the project’s local node_modules TypeScript install ensures the team uses the <text:span text:style-name="T17">same TypeScript version</text:span>.</text:p>
      <text:p text:style-name="Normal">Why this matters:</text:p>
      <text:list text:style-name="LFO2" text:continue-numbering="true">
        <text:list-item>
          <text:p text:style-name="P18">The build may rely on a specific TypeScript version.</text:p>
        </text:list-item>
        <text:list-item>
          <text:p text:style-name="P19">If VS Code uses a different global version, you can get inconsistent type checking, autocomplete, or diagnostics.</text:p>
        </text:list-item>
        <text:list-item>
          <text:p text:style-name="P20">Aligning the editor with the build prevents “works in my editor, fails in CI” issues.</text:p>
        </text:list-item>
      </text:list>
      <text:p text:style-name="P21">3) Share recommended extensions</text:p>
      <text:p text:style-name="Normal">A .vscode/extensions.json file lists extensions the project recommends.</text:p>
      <text:p text:style-name="Normal">What happens:</text:p>
      <text:list text:style-name="LFO3" text:continue-numbering="true">
        <text:list-item>
          <text:p text:style-name="P22">When someone opens the project, VS Code can prompt them to install those extensions.</text:p>
        </text:list-item>
        <text:list-item>
          <text:p text:style-name="P23">This helps the team use the same tooling setup, such as:</text:p>
          <text:soft-page-break/>
          <text:list text:continue-numbering="true">
            <text:list-item>
              <text:p text:style-name="P24">a formatter like Prettier</text:p>
            </text:list-item>
            <text:list-item>
              <text:p text:style-name="P25">a linter like ESLint</text:p>
            </text:list-item>
            <text:list-item>
              <text:p text:style-name="P26">a convenience tool like Live Server</text:p>
            </text:list-item>
          </text:list>
        </text:list-item>
      </text:list>
      <text:p text:style-name="Normal">Why this is valuable:</text:p>
      <text:list text:style-name="LFO4" text:continue-numbering="true">
        <text:list-item>
          <text:p text:style-name="P27">Fewer setup differences across the team</text:p>
        </text:list-item>
        <text:list-item>
          <text:p text:style-name="P28">Faster onboarding for new developers</text:p>
        </text:list-item>
        <text:list-item>
          <text:p text:style-name="P29">More consistent code quality and workflow</text:p>
        </text:list-item>
      </text:list>
      <text:p text:style-name="P30">4) Built-in debugging and terminal</text:p>
      <text:p text:style-name="Normal">VS Code includes a strong <text:span text:style-name="T31">debugger</text:span> and an <text:span text:style-name="T32">integrated terminal</text:span>, which means you can often do most development tasks without leaving the editor.</text:p>
      <text:list text:style-name="LFO5" text:continue-numbering="true">
        <text:list-item>
          <text:p text:style-name="P33"><text:span text:style-name="T34">Debugger</text:span>: lets you set breakpoints, inspect variables, step through code, and troubleshoot issues.</text:p>
        </text:list-item>
        <text:list-item>
          <text:p text:style-name="P35"><text:span text:style-name="T36">Integrated terminal</text:span>: lets you run commands like npm install, npm run dev, or tests directly inside VS Code.</text:p>
        </text:list-item>
      </text:list>
      <text:p text:style-name="P37">Big picture</text:p>
      <text:p text:style-name="Normal">All of these settings and files are about <text:span text:style-name="T38">standardizing the development environment</text:span>. The goal is to make sure:</text:p>
      <text:list text:style-name="LFO6" text:continue-numbering="true">
        <text:list-item>
          <text:p text:style-name="P39">code is formatted consistently,</text:p>
        </text:list-item>
        <text:list-item>
          <text:p text:style-name="P40">everyone uses the same TypeScript version,</text:p>
        </text:list-item>
        <text:list-item>
          <text:p text:style-name="P41">the same extensions are installed,</text:p>
        </text:list-item>
        <text:list-item>
          <text:p text:style-name="P42">and debugging/running the app is smooth.</text:p>
        </text:list-item>
      </text:list>
      <text:p text:style-name="Normal">That reduces setup friction and makes collaboration easier.</text:p>
      <text:p text:style-name="Normal">If you want, I can also show you a <text:span text:style-name="T43">sample .vscode/settings.json and extensions.json</text:span> for a JavaScript/TypeScript frontend projec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vya R</meta:initial-creator>
    <dc:creator>Divya R</dc:creator>
    <meta:creation-date>2026-07-17T12:41:00Z</meta:creation-date>
    <dc:date>2026-07-17T15:26:00Z</dc:date>
    <meta:template xlink:href="Normal" xlink:type="simple"/>
    <meta:editing-cycles>1</meta:editing-cycles>
    <meta:editing-duration>PT9900S</meta:editing-duration>
    <meta:document-statistic meta:page-count="2" meta:paragraph-count="5" meta:word-count="374" meta:character-count="2503" meta:row-count="17" meta:non-whitespace-character-count="2134"/>
  </office:meta>
</office:document-meta>
</file>